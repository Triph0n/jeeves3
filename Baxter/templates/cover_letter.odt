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rlito" svg:font-family="Carlito" style:font-family-generic="swiss" style:font-pitch="variable" svg:panose-1="2 15 5 2 2 2 4 3 2 4"/>
    <style:font-face style:name="Bahnschrift" svg:font-family="Bahnschrift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Absatz-Standardschriftart" style:family="text">
      <style:text-properties style:font-name="Carlito" style:font-name-asian="Bahnschrift" style:font-name-complex="Bahnschrift" fo:font-weight="bold" style:font-weight-asian="bold" style:font-weight-complex="bold" fo:color="#000000"/>
    </style:style>
    <style:style style:name="T3" style:parent-style-name="Absatz-Standardschriftart" style:family="text">
      <style:text-properties style:font-name="Carlito" style:font-name-asian="Bahnschrift" style:font-name-complex="Bahnschrift" fo:font-weight="bold" style:font-weight-asian="bold" style:font-weight-complex="bold" fo:color="#000000"/>
    </style:style>
    <style:style style:name="P4" style:parent-style-name="Standard" style:family="paragraph">
      <style:paragraph-properties style:text-autospace="none"/>
      <style:text-properties style:font-name="Carlito" style:font-name-asian="Bahnschrift" style:font-name-complex="Bahnschrift" fo:color="#000000"/>
    </style:style>
    <style:style style:name="P5" style:parent-style-name="Standard" style:family="paragraph">
      <style:paragraph-properties style:text-autospace="none"/>
      <style:text-properties style:font-name="Carlito" style:font-name-asian="Bahnschrift" style:font-name-complex="Bahnschrift" fo:color="#000000"/>
    </style:style>
    <style:style style:name="P6" style:parent-style-name="Standard" style:family="paragraph">
      <style:paragraph-properties style:text-autospace="none"/>
      <style:text-properties style:font-name="Carlito" style:font-name-asian="Bahnschrift" style:font-name-complex="Bahnschrift" fo:color="#000000"/>
    </style:style>
    <style:style style:name="P7" style:parent-style-name="Standard" style:family="paragraph">
      <style:paragraph-properties style:text-autospace="none"/>
      <style:text-properties style:font-name="Carlito" style:font-name-asian="Bahnschrift" style:font-name-complex="Bahnschrift" fo:color="#000000"/>
    </style:style>
    <style:style style:name="P8" style:parent-style-name="Standard" style:family="paragraph">
      <style:paragraph-properties style:text-autospace="none"/>
      <style:text-properties style:font-name="Carlito" style:font-name-asian="Bahnschrift" style:font-name-complex="Bahnschrift" fo:color="#000000"/>
    </style:style>
    <style:style style:name="P9" style:parent-style-name="Standard" style:family="paragraph">
      <style:paragraph-properties style:text-autospace="none"/>
    </style:style>
    <style:style style:name="T10" style:parent-style-name="Absatz-Standardschriftart" style:family="text">
      <style:text-properties style:font-name="Carlito" style:font-name-asian="Bahnschrift" style:font-name-complex="Bahnschrift" fo:color="#000000"/>
    </style:style>
    <style:style style:name="T11" style:parent-style-name="Absatz-Standardschriftart" style:family="text">
      <style:text-properties style:font-name="Carlito" style:font-name-asian="Bahnschrift" style:font-name-complex="Bahnschrift" fo:color="#000081"/>
    </style:style>
    <style:style style:name="P12" style:parent-style-name="Standard" style:family="paragraph">
      <style:paragraph-properties style:text-autospace="none"/>
      <style:text-properties style:font-name="Carlito"/>
    </style:style>
    <style:style style:name="P13" style:parent-style-name="Standard" style:family="paragraph">
      <style:paragraph-properties style:text-autospace="none"/>
      <style:text-properties style:font-name="Carlito"/>
    </style:style>
    <style:style style:name="P14" style:parent-style-name="Standard" style:family="paragraph">
      <style:paragraph-properties style:text-autospace="none"/>
      <style:text-properties style:font-name="Carlito"/>
    </style:style>
    <style:style style:name="P15" style:parent-style-name="Standard" style:family="paragraph">
      <style:paragraph-properties style:text-autospace="none"/>
      <style:text-properties style:font-name="Carlito"/>
    </style:style>
    <style:style style:name="P16" style:parent-style-name="Standard" style:family="paragraph">
      <style:paragraph-properties fo:text-align="justify"/>
      <style:text-properties style:font-name="Carlito"/>
    </style:style>
    <style:style style:name="P17" style:parent-style-name="Textbody" style:family="paragraph">
      <style:paragraph-properties style:text-autospace="none"/>
      <style:text-properties style:font-name="Carlito" fo:font-weight="bold" style:font-weight-asian="bold"/>
    </style:style>
    <style:style style:name="P18" style:parent-style-name="Textbody" style:family="paragraph"/>
    <style:style style:name="T19" style:parent-style-name="Absatz-Standardschriftart" style:family="text">
      <style:text-properties fo:font-weight="bold" style:font-weight-asian="bold"/>
    </style:style>
    <style:style style:name="P20" style:parent-style-name="Textbody" style:family="paragraph"/>
    <style:style style:name="T21" style:parent-style-name="Absatz-Standardschriftart" style:family="text">
      <style:text-properties fo:font-weight="bold" style:font-weight-asian="bold"/>
    </style:style>
    <style:style style:name="P22" style:parent-style-name="Textbody" style:family="paragraph"/>
    <style:style style:name="T23" style:parent-style-name="Absatz-Standardschriftart" style:family="text">
      <style:text-properties fo:font-weight="bold" style:font-weight-asian="bold"/>
    </style:style>
    <style:style style:name="P24" style:parent-style-name="Textbody" style:family="paragraph">
      <style:paragraph-properties style:text-autospace="none"/>
      <style:text-properties style:font-name="Carlito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obrázky1" text:anchor-type="paragraph" svg:x="5.10984in" svg:y="0.15157in" svg:width="1.66811in" svg:height="1.62087in" style:rel-width="scale" style:rel-height="scale"><draw:image xlink:href="media/image1.jpeg" xlink:type="simple" xlink:show="embed" xlink:actuate="onLoad"/><svg:title/><svg:desc/></draw:frame></text:span><text:span text:style-name="T3">Vladimir Fortin</text:span></text:p>
      <text:p text:style-name="P4">Egetswilerstrasse 77</text:p>
      <text:p text:style-name="P5">8302 Kloten</text:p>
      <text:p text:style-name="P6">Schweiz</text:p>
      <text:p text:style-name="P7"/>
      <text:p text:style-name="P8">Telefon: +41 77 43 93 708</text:p>
      <text:p text:style-name="P9"><text:span text:style-name="T10">E-mail:<text:s/></text:span><text:a xlink:href="mailto:vladimir.fortin@gmail.com" office:target-frame-name="_top" xlink:show="replace"><text:span text:style-name="T11">vladimir.fortin@gmail.com</text:span></text:a></text:p>
      <text:p text:style-name="P12"/>
      <text:p text:style-name="P13"/>
      <text:p text:style-name="P14"/>
      <text:p text:style-name="P15"/>
      <text:p text:style-name="P16"/>
      <text:p text:style-name="P17">Bewerbung als Lehrperson für Cello</text:p>
      <text:p text:style-name="Textbody">{{ salutation }}</text:p>
      <text:p text:style-name="Textbody">als leidenschaftlicher Cellist und Pädagoge bewerbe ich mich mit grossem Interesse um die Position an der Musikschule<text:s/>{{ school_name }}. Dass das<text:s/>ausgeschriebene Pensum klein, aber ausbaufähig ist, sehe ich als wunderbare Chance: Mit meiner 30-jährigen Erfahrung möchte ich aktiv dazu beitragen, eine wachsende und lebendige Celloklasse an Ihrer Schule aufzubauen.</text:p>
      <text:p text:style-name="Textbody">Um Ihre Schülerinnen und Schüler bestmöglich zu fördern und das musikalische Leben der Schule mitzugestalten, bringe ich folgende Kernkompetenzen mit:</text:p>
      <text:list text:style-name="LFO1" text:continue-numbering="true">
        <text:list-item>
          <text:p text:style-name="P18"><text:span text:style-name="T19">Pädagogisches Fundament &amp; Methodenvielfalt:</text:span><text:s/>Neben meiner langjährigen Lehrtätigkeit (u. a. Musikakademie Basel) habe ich kürzlich das CAS Klassenmusizieren (ZHdK) abgeschlossen und dafür eigenes Gruppen-Unterrichtsmaterial entwickelt. Ich kombiniere die klassische Methodik mit der Suzuki-Methode (aktuell Weiterbildung Level 3) und habe zudem Erfahrung in der Arbeit mit Asperger-Kindern.</text:p>
        </text:list-item>
        <text:list-item>
          <text:p text:style-name="P20"><text:span text:style-name="T21">Aufbau eines Streichensembles:</text:span><text:s/>Das in der Ausschreibung erwähnte Ensemble reizt mich besonders. Durch meine langjährige Erfahrung im Zemlinsky-Quartett sowie im Ensemble-Coaching und Arrangieren bringe ich hierfür das ideale Handwerkszeug mit.</text:p>
        </text:list-item>
        <text:list-item>
          <text:p text:style-name="P22"><text:span text:style-name="T23">Konzertante Mitwirkung:</text:span><text:s/>Ihre Anforderung, aktiv an Schulkonzerten mitzuwirken, erfülle ich aus vollster Überzeugung. Meine internationale Konzerterfahrung (u. a. Wigmore Hall, Cité de la Musique) und über 20 CD-Aufnahmen haben meine Liebe zum Auftritt geprägt, die ich gerne an die Schüler weitergebe.</text:p>
        </text:list-item>
      </text:list>
      <text:p text:style-name="Textbody">Mein Unterricht ist individuell auf jeden Schüler abgestimmt – von der behutsamen Einführung junger Anfänger bis zur gezielten Vorbereitung fortgeschrittener Talente.</text:p>
      <text:p text:style-name="Textbody">Sehr gerne bringe ich meine zeitliche Flexibilität und Begeisterung für die Musik in Ihr Team ein. Auf ein persönliches Gespräch freue ich mich sehr.</text:p>
      <text:p text:style-name="Textbody">Mit freundlichen Grüssen</text:p>
      <text:p text:style-name="Textbody">Vladimir Fortin</text:p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rlito" svg:font-family="Carlito" style:font-family-generic="swiss" style:font-pitch="variable" svg:panose-1="2 15 5 2 2 2 4 3 2 4"/>
    <style:font-face style:name="Bahnschrift" svg:font-family="Bahnschrift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cxmsonormal" style:display-name="ecxmsonormal" style:family="paragraph" style:parent-style-name="Standard">
      <style:paragraph-properties fo:margin-top="0.0694in" fo:margin-bottom="0.0694in" style:line-height-at-least="0.0694in"/>
      <style:text-properties style:font-name-asian="Times New Roman" style:font-name-complex="Times New Roman" style:language-asian="cs" style:country-asian="CZ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vladimir </meta:initial-creator>
    <dc:creator>Vladimir Fortin</dc:creator>
    <meta:creation-date>2023-01-14T01:48:00Z</meta:creation-date>
    <dc:date>2026-05-27T00:44:00Z</dc:date>
    <meta:template xlink:href="Normal.dotm" xlink:type="simple"/>
    <meta:editing-cycles>21</meta:editing-cycles>
    <meta:editing-duration>PT0S</meta:editing-duration>
    <meta:document-statistic meta:page-count="1" meta:paragraph-count="4" meta:word-count="279" meta:character-count="2034" meta:row-count="14" meta:non-whitespace-character-count="1759"/>
  </office:meta>
</office:document-meta>
</file>